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C0000004DB822D260.png" manifest:media-type="image/png"/>
  <manifest:file-entry manifest:full-path="Pictures/100000000000012C0000004D96F795FA.png" manifest:media-type="image/png"/>
  <manifest:file-entry manifest:full-path="Pictures/100000000000012C0000004D256E313A.png" manifest:media-type="image/png"/>
  <manifest:file-entry manifest:full-path="Pictures/100000000000012C0000004DF644082C.png" manifest:media-type="image/png"/>
  <manifest:file-entry manifest:full-path="Pictures/10000201000003000000030D892DD1A3.png" manifest:media-type="image/png"/>
  <manifest:file-entry manifest:full-path="Pictures/1000000000000300000003134F3899E7.png" manifest:media-type="image/png"/>
  <manifest:file-entry manifest:full-path="Pictures/1000020100000300000000F3A38F4F5D.png" manifest:media-type="image/png"/>
  <manifest:file-entry manifest:full-path="Pictures/100000000000012C00000113AF6A2CD0.png" manifest:media-type="image/png"/>
  <manifest:file-entry manifest:full-path="Pictures/10000200000001F400000060EB4B6112.gif" manifest:media-type="image/gif"/>
  <manifest:file-entry manifest:full-path="Pictures/100000000000012C000000DAF7CA7007.png" manifest:media-type="image/png"/>
  <manifest:file-entry manifest:full-path="Pictures/100002010000040000000102EEB1C3C8.png" manifest:media-type="image/png"/>
  <manifest:file-entry manifest:full-path="Pictures/100000000000012C000001132D44B072.png" manifest:media-type="image/png"/>
  <manifest:file-entry manifest:full-path="Pictures/100000000000012C000001154421FCF5.png" manifest:media-type="image/png"/>
  <manifest:file-entry manifest:full-path="Pictures/10000201000003000000019962A4EC8A.png" manifest:media-type="image/png"/>
  <manifest:file-entry manifest:full-path="Pictures/100000000000012C000000DA1C51C64D.png" manifest:media-type="image/png"/>
  <manifest:file-entry manifest:full-path="Pictures/100000000000012C0000008BD07C9839.png" manifest:media-type="image/png"/>
  <manifest:file-entry manifest:full-path="Pictures/100000000000012C000000B3A27C61CF.png" manifest:media-type="image/png"/>
  <manifest:file-entry manifest:full-path="Pictures/100000000000012C000000B3BC2CD0BE.png" manifest:media-type="image/png"/>
  <manifest:file-entry manifest:full-path="Pictures/100000000000012C00000123E7B0AD6E.png" manifest:media-type="image/png"/>
  <manifest:file-entry manifest:full-path="Pictures/1000000000000300000000F3A200332B.png" manifest:media-type="image/png"/>
  <manifest:file-entry manifest:full-path="Pictures/100000000000012C0000010F7D6FF1FA.png" manifest:media-type="image/png"/>
  <manifest:file-entry manifest:full-path="Pictures/1000000000000262000000CF470ACC5E.png" manifest:media-type="image/png"/>
  <manifest:file-entry manifest:full-path="Pictures/100000000000028A000001F72059F801.png" manifest:media-type="image/png"/>
  <manifest:file-entry manifest:full-path="Pictures/1000020100000190000000FAD5164F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tserrat" svg:font-family="Montserrat, Helvetica, Arial, Lucida, sans-serif"/>
    <style:font-face style:name="inherit" svg:font-family="inherit"/>
    <style:font-face style:name="miltonian tattoo" svg:font-family="'miltonian tattoo', sans-serif"/>
    <style:font-face style:name="Times new roman" svg:font-family="'Times new roman'" style:font-family-generic="roman"/>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fo:font-variant="normal" fo:text-transform="none" fo:color="#5f727f" style:font-name="Times new roman" fo:font-size="12pt" fo:letter-spacing="normal" fo:font-style="normal" fo:font-weight="normal" officeooo:paragraph-rsid="001bbb2e" style:font-size-asian="12pt" style:font-size-complex="12pt"/>
    </style:style>
    <style:style style:name="P2" style:family="paragraph" style:parent-style-name="Text_20_body">
      <style:text-properties fo:font-variant="normal" fo:text-transform="none" fo:color="#5f727f" style:font-name="Times new roman" fo:font-size="12pt" fo:letter-spacing="normal" fo:font-style="normal" fo:font-weight="normal" officeooo:paragraph-rsid="001bbb2e" style:font-size-asian="12pt" style:font-size-complex="12pt"/>
    </style:style>
    <style:style style:name="P3" style:family="paragraph" style:parent-style-name="Text_20_body">
      <style:paragraph-properties fo:text-align="start" style:justify-single-word="false"/>
      <style:text-properties fo:font-variant="normal" fo:text-transform="none" fo:color="#000000" style:font-name="miltonian tattoo" fo:font-size="12pt" fo:letter-spacing="normal" fo:font-style="normal" fo:font-weight="normal" officeooo:paragraph-rsid="001bbb2e" style:font-size-asian="10.5pt" style:font-size-complex="12pt"/>
    </style:style>
    <style:style style:name="P4" style:family="paragraph" style:parent-style-name="Text_20_body">
      <style:paragraph-properties fo:text-align="start" style:justify-single-word="false"/>
      <style:text-properties fo:font-variant="normal" fo:text-transform="none" style:font-name="Montserrat" fo:font-size="11.25pt" fo:letter-spacing="normal" fo:font-style="normal" fo:font-weight="normal" officeooo:paragraph-rsid="001bbb2e"/>
    </style:style>
    <style:style style:name="P5" style:family="paragraph" style:parent-style-name="Text_20_body">
      <style:paragraph-properties fo:text-align="center" style:justify-single-word="false"/>
      <style:text-properties officeooo:paragraph-rsid="001bbb2e"/>
    </style:style>
    <style:style style:name="P6" style:family="paragraph" style:parent-style-name="Text_20_body">
      <style:paragraph-properties fo:text-align="start" style:justify-single-word="false"/>
      <style:text-properties officeooo:paragraph-rsid="001bbb2e"/>
    </style:style>
    <style:style style:name="P7" style:family="paragraph" style:parent-style-name="Text_20_body">
      <style:text-properties officeooo:paragraph-rsid="001bbb2e"/>
    </style:style>
    <style:style style:name="P8" style:family="paragraph" style:parent-style-name="Preformatted_20_Text">
      <style:paragraph-properties fo:margin-top="0cm" fo:margin-bottom="0cm" style:contextual-spacing="false" fo:text-align="justify" style:justify-single-word="false" fo:orphans="2" fo:widows="2"/>
      <style:text-properties fo:font-variant="normal" fo:text-transform="none" fo:color="#333333" style:font-name="Times new roman" fo:font-size="12pt" fo:letter-spacing="normal" fo:font-style="normal" fo:font-weight="normal" officeooo:paragraph-rsid="001bbb2e" style:font-size-asian="12pt" style:font-size-complex="12pt"/>
    </style:style>
    <style:style style:name="P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1bbb2e"/>
    </style:style>
    <style:style style:name="P1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976d2" style:text-line-through-style="none" style:text-line-through-type="none" fo:letter-spacing="normal" style:text-underline-style="none" officeooo:paragraph-rsid="001bbb2e" style:text-blinking="false" fo:padding="0cm" fo:border="none"/>
    </style:style>
    <style:style style:name="P1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style:font-name="Montserrat" fo:font-size="11.25pt" fo:letter-spacing="normal" fo:font-style="normal" fo:font-weight="normal" officeooo:paragraph-rsid="001bbb2e"/>
    </style:style>
    <style:style style:name="P1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4f9" fo:letter-spacing="normal" officeooo:paragraph-rsid="001bbb2e" fo:padding="0cm" fo:border="none"/>
    </style:style>
    <style:style style:name="P1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f70041" fo:letter-spacing="normal" officeooo:paragraph-rsid="001bbb2e" fo:padding="0cm" fo:border="none"/>
    </style:style>
    <style:style style:name="P14" style:family="paragraph" style:parent-style-name="Heading_20_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style:font-name="inherit" fo:font-size="14pt" fo:letter-spacing="normal" fo:font-style="normal" fo:font-weight="bold" officeooo:paragraph-rsid="001bbb2e" style:font-size-asian="14pt" style:font-size-complex="14pt" fo:padding="0cm" fo:border="none"/>
    </style:style>
    <style:style style:name="P15" style:family="paragraph" style:parent-style-name="Heading_20_3">
      <style:paragraph-properties fo:margin-left="0cm" fo:margin-right="0cm" fo:margin-top="0cm" fo:margin-bottom="0cm" style:contextual-spacing="false" fo:orphans="2" fo:widows="2" fo:text-indent="0cm" style:auto-text-indent="false" fo:padding="0cm" fo:border="none"/>
      <style:text-properties fo:text-transform="uppercase" fo:color="#1976d2" style:font-name="Montserrat" fo:font-size="15pt" fo:letter-spacing="normal" fo:font-style="normal" fo:font-weight="bold" officeooo:paragraph-rsid="001bbb2e"/>
    </style:style>
    <style:style style:name="P16" style:family="paragraph" style:parent-style-name="Preformatted_20_Text">
      <style:paragraph-properties fo:margin-left="0cm" fo:margin-right="0cm" fo:margin-top="0cm" fo:margin-bottom="0cm" style:contextual-spacing="false" fo:text-align="justify" style:justify-single-word="false" fo:orphans="2" fo:widows="2" fo:text-indent="0cm" style:auto-text-indent="false"/>
      <style:text-properties style:font-name="Times new roman" fo:font-size="12pt" officeooo:paragraph-rsid="001bbb2e" style:font-size-asian="12pt" style:font-size-complex="12pt"/>
    </style:style>
    <style:style style:name="P17" style:family="paragraph" style:parent-style-name="Heading_20_1">
      <style:paragraph-properties fo:text-align="start" style:justify-single-word="false"/>
      <style:text-properties fo:font-variant="normal" fo:text-transform="none" fo:color="#000000" style:font-name="inherit" fo:font-size="14pt" fo:letter-spacing="normal" fo:font-style="normal" fo:font-weight="bold" officeooo:paragraph-rsid="001bbb2e" style:font-size-asian="14pt" style:font-size-complex="14pt" fo:padding="0cm" fo:border="none"/>
    </style:style>
    <style:style style:name="P18" style:family="paragraph" style:parent-style-name="Heading_20_1">
      <style:text-properties fo:font-variant="normal" fo:text-transform="none" fo:color="#000000" style:font-name="inherit" fo:font-size="18pt" fo:letter-spacing="normal" fo:font-style="normal" fo:font-weight="bold" officeooo:paragraph-rsid="001bbb2e" fo:padding="0cm" fo:border="none"/>
    </style:style>
    <style:style style:name="P19" style:family="paragraph" style:parent-style-name="Heading_20_3">
      <style:text-properties fo:text-transform="uppercase" fo:color="#1976d2" style:font-name="Montserrat" fo:font-size="15pt" fo:letter-spacing="normal" fo:font-style="normal" fo:font-weight="bold" officeooo:paragraph-rsid="001bbb2e"/>
    </style:style>
    <style:style style:name="P20" style:family="paragraph" style:parent-style-name="Text_20_body" style:list-style-name="L2">
      <style:text-properties officeooo:paragraph-rsid="001bbb2e"/>
    </style:style>
    <style:style style:name="P21" style:family="paragraph" style:parent-style-name="Text_20_body" style:list-style-name="L2">
      <style:text-properties style:font-name="Times new roman" fo:font-size="12pt" officeooo:paragraph-rsid="001bbb2e" style:font-size-asian="12pt" style:font-size-complex="12pt"/>
    </style:style>
    <style:style style:name="P22" style:family="paragraph" style:parent-style-name="Text_20_body" style:list-style-name="L2">
      <style:text-properties fo:font-variant="normal" fo:text-transform="none" fo:color="#666666" style:font-name="Times new roman" fo:font-size="12pt" fo:letter-spacing="normal" fo:font-style="normal" fo:font-weight="normal" officeooo:paragraph-rsid="001bbb2e" style:font-size-asian="12pt" style:font-size-complex="12pt"/>
    </style:style>
    <style:style style:name="P23" style:family="paragraph" style:parent-style-name="Text_20_body" style:list-style-name="L2">
      <style:text-properties fo:font-variant="normal" fo:text-transform="none" fo:color="#5f727f" style:font-name="Times new roman" fo:font-size="12pt" fo:letter-spacing="normal" fo:font-style="normal" fo:font-weight="normal" officeooo:paragraph-rsid="001bbb2e" style:font-size-asian="12pt" style:font-size-complex="12pt"/>
    </style:style>
    <style:style style:name="P24" style:family="paragraph" style:parent-style-name="Text_20_body">
      <style:text-properties fo:font-variant="normal" fo:text-transform="none" fo:color="#5f727f" style:font-name="Times new roman" fo:font-size="12pt" fo:letter-spacing="normal" fo:font-style="normal" fo:font-weight="normal" officeooo:paragraph-rsid="001bbb2e" style:font-size-asian="12pt" style:font-size-complex="12pt"/>
    </style:style>
    <style:style style:name="P25" style:family="paragraph" style:parent-style-name="Text_20_body" style:list-style-name="L3">
      <style:text-properties fo:font-variant="normal" fo:text-transform="none" fo:color="#000000" style:font-name="inherit" fo:font-size="14pt" fo:letter-spacing="normal" fo:font-style="normal" fo:font-weight="bold" officeooo:paragraph-rsid="001bbb2e" style:font-size-asian="14pt" style:font-size-complex="14pt" fo:padding="0cm" fo:border="none"/>
    </style:style>
    <style:style style:name="P26" style:family="paragraph" style:parent-style-name="Text_20_body" style:list-style-name="L4">
      <style:text-properties fo:font-variant="normal" fo:text-transform="none" style:font-name="Montserrat" fo:font-size="11.25pt" fo:letter-spacing="normal" fo:font-style="normal" fo:font-weight="normal" officeooo:paragraph-rsid="001bbb2e"/>
    </style:style>
    <style:style style:name="P27" style:family="paragraph" style:parent-style-name="Text_20_body" style:list-style-name="L9">
      <style:paragraph-properties fo:text-align="start" style:justify-single-word="false"/>
      <style:text-properties fo:font-variant="normal" fo:text-transform="none" style:font-name="Montserrat" fo:font-size="11.25pt" fo:letter-spacing="normal" fo:font-style="normal" fo:font-weight="normal" officeooo:paragraph-rsid="001bbb2e"/>
    </style:style>
    <style:style style:name="P28" style:family="paragraph" style:parent-style-name="Text_20_body" style:list-style-name="L11">
      <style:text-properties fo:font-variant="normal" fo:text-transform="none" style:font-name="Montserrat" fo:font-size="11.25pt" fo:letter-spacing="normal" fo:font-style="normal" fo:font-weight="normal" officeooo:paragraph-rsid="001bbb2e"/>
    </style:style>
    <style:style style:name="P29" style:family="paragraph" style:parent-style-name="Text_20_body" style:list-style-name="L13">
      <style:text-properties fo:font-variant="normal" fo:text-transform="none" style:font-name="Montserrat" fo:font-size="11.25pt" fo:letter-spacing="normal" fo:font-style="normal" fo:font-weight="normal" officeooo:paragraph-rsid="001bbb2e"/>
    </style:style>
    <style:style style:name="P30" style:family="paragraph" style:parent-style-name="Text_20_body" style:list-style-name="L9">
      <style:paragraph-properties fo:text-align="start" style:justify-single-word="false"/>
      <style:text-properties fo:font-variant="normal" fo:text-transform="none" style:font-name="Montserrat" fo:font-size="11.25pt" fo:letter-spacing="normal" fo:font-style="normal" fo:font-weight="bold" officeooo:paragraph-rsid="001bbb2e" style:font-weight-asian="bold" style:font-weight-complex="bold"/>
    </style:style>
    <style:style style:name="P31" style:family="paragraph" style:parent-style-name="Text_20_body" style:list-style-name="L3">
      <style:text-properties officeooo:paragraph-rsid="001bbb2e"/>
    </style:style>
    <style:style style:name="P32" style:family="paragraph" style:parent-style-name="Text_20_body" style:list-style-name="L4">
      <style:text-properties fo:text-transform="uppercase" fo:color="#1976d2" style:font-name="Montserrat" fo:font-size="15pt" fo:letter-spacing="normal" fo:font-style="normal" fo:font-weight="bold" officeooo:paragraph-rsid="001bbb2e"/>
    </style:style>
    <style:style style:name="P33" style:family="paragraph" style:parent-style-name="Text_20_body" style:list-style-name="L13">
      <style:text-properties officeooo:paragraph-rsid="001bbb2e"/>
    </style:style>
    <style:style style:name="P34" style:family="paragraph" style:parent-style-name="Text_20_body" style:list-style-name="L2">
      <style:paragraph-properties fo:margin-top="0cm" fo:margin-bottom="0cm" style:contextual-spacing="false" fo:text-align="justify" style:justify-single-word="false" fo:orphans="2" fo:widows="2"/>
      <style:text-properties fo:font-variant="normal" fo:text-transform="none" fo:color="#333333" style:font-name="Times new roman" fo:font-size="12pt" fo:letter-spacing="normal" fo:font-style="normal" fo:font-weight="normal" officeooo:paragraph-rsid="001bbb2e" style:font-size-asian="12pt" style:font-size-complex="12pt"/>
    </style:style>
    <style:style style:name="P35" style:family="paragraph" style:parent-style-name="Text_20_body" style:list-style-name="L3">
      <style:paragraph-properties fo:margin-top="0cm" fo:margin-bottom="0cm" style:contextual-spacing="false" fo:orphans="2" fo:widows="2" fo:padding="0cm" fo:border="none"/>
      <style:text-properties fo:font-variant="normal" fo:text-transform="none" fo:color="#000000" style:font-name="inherit" fo:font-size="12pt" fo:letter-spacing="normal" fo:font-style="normal" fo:font-weight="normal" officeooo:paragraph-rsid="001bbb2e" fo:padding="0cm" fo:border="none"/>
    </style:style>
    <style:style style:name="P36" style:family="paragraph" style:parent-style-name="Text_20_body" style:list-style-name="L5">
      <style:paragraph-properties fo:margin-top="0cm" fo:margin-bottom="0cm" style:contextual-spacing="false" fo:orphans="2" fo:widows="2" fo:padding="0cm" fo:border="none"/>
      <style:text-properties fo:font-variant="normal" fo:text-transform="none" fo:color="#000000" style:font-name="inherit" fo:font-size="12pt" fo:letter-spacing="normal" fo:font-style="normal" fo:font-weight="normal" officeooo:paragraph-rsid="001bbb2e" fo:padding="0cm" fo:border="none"/>
    </style:style>
    <style:style style:name="P37" style:family="paragraph" style:parent-style-name="Text_20_body" style:list-style-name="L6">
      <style:paragraph-properties fo:margin-top="0cm" fo:margin-bottom="0cm" style:contextual-spacing="false" fo:orphans="2" fo:widows="2" fo:padding="0cm" fo:border="none"/>
      <style:text-properties fo:font-variant="normal" fo:text-transform="none" fo:color="#000000" style:font-name="inherit" fo:font-size="12pt" fo:letter-spacing="normal" fo:font-style="normal" fo:font-weight="normal" officeooo:paragraph-rsid="001bbb2e" fo:padding="0cm" fo:border="none"/>
    </style:style>
    <style:style style:name="P38" style:family="paragraph" style:parent-style-name="Text_20_body" style:list-style-name="L7">
      <style:paragraph-properties fo:margin-top="0cm" fo:margin-bottom="0cm" style:contextual-spacing="false" fo:orphans="2" fo:widows="2" fo:padding="0cm" fo:border="none"/>
      <style:text-properties fo:font-variant="normal" fo:text-transform="none" fo:color="#000000" style:font-name="inherit" fo:font-size="12pt" fo:letter-spacing="normal" fo:font-style="normal" fo:font-weight="normal" officeooo:paragraph-rsid="001bbb2e" fo:padding="0cm" fo:border="none"/>
    </style:style>
    <style:style style:name="P39" style:family="paragraph" style:parent-style-name="Text_20_body" style:list-style-name="L8">
      <style:paragraph-properties fo:margin-top="0cm" fo:margin-bottom="0cm" style:contextual-spacing="false" fo:orphans="2" fo:widows="2" fo:padding="0cm" fo:border="none"/>
      <style:text-properties fo:font-variant="normal" fo:text-transform="none" fo:color="#000000" style:font-name="inherit" fo:font-size="12pt" fo:letter-spacing="normal" fo:font-style="normal" fo:font-weight="normal" officeooo:paragraph-rsid="001bbb2e" fo:padding="0cm" fo:border="none"/>
    </style:style>
    <style:style style:name="P40" style:family="paragraph" style:parent-style-name="Text_20_body" style:list-style-name="L3">
      <style:paragraph-properties fo:margin-top="0cm" fo:margin-bottom="0cm" style:contextual-spacing="false" fo:orphans="2" fo:widows="2" fo:padding="0cm" fo:border="none"/>
      <style:text-properties fo:font-variant="normal" fo:text-transform="none" fo:color="#000000" style:font-name="inherit" fo:font-size="14pt" fo:letter-spacing="normal" fo:font-style="normal" fo:font-weight="bold" officeooo:paragraph-rsid="001bbb2e" style:font-size-asian="14pt" style:font-size-complex="14pt" fo:padding="0cm" fo:border="none"/>
    </style:style>
    <style:style style:name="P41" style:family="paragraph" style:parent-style-name="Text_20_body" style:list-style-name="L3">
      <style:paragraph-properties fo:margin-top="0cm" fo:margin-bottom="0cm" style:contextual-spacing="false" fo:orphans="2" fo:widows="2" fo:padding="0cm" fo:border="none"/>
      <style:text-properties fo:font-variant="normal" fo:text-transform="none" fo:color="#000000" fo:letter-spacing="normal" officeooo:paragraph-rsid="001bbb2e"/>
    </style:style>
    <style:style style:name="P42" style:family="paragraph" style:parent-style-name="Text_20_body" style:list-style-name="L4">
      <style:paragraph-properties fo:margin-top="0cm" fo:margin-bottom="0cm" style:contextual-spacing="false" fo:orphans="2" fo:widows="2" fo:padding="0cm" fo:border="none"/>
      <style:text-properties fo:font-variant="normal" fo:text-transform="none" style:font-name="Montserrat" fo:font-size="11.25pt" fo:letter-spacing="normal" fo:font-style="normal" fo:font-weight="normal" officeooo:paragraph-rsid="001bbb2e"/>
    </style:style>
    <style:style style:name="P43" style:family="paragraph" style:parent-style-name="Text_20_body" style:list-style-name="L10">
      <style:paragraph-properties fo:margin-top="0cm" fo:margin-bottom="0cm" style:contextual-spacing="false" fo:orphans="2" fo:widows="2" fo:padding="0cm" fo:border="none"/>
      <style:text-properties fo:font-variant="normal" fo:text-transform="none" style:font-name="Montserrat" fo:font-size="11.25pt" fo:letter-spacing="normal" fo:font-style="normal" fo:font-weight="normal" officeooo:paragraph-rsid="001bbb2e"/>
    </style:style>
    <style:style style:name="P44" style:family="paragraph" style:parent-style-name="Text_20_body" style:list-style-name="L12">
      <style:paragraph-properties fo:margin-top="0cm" fo:margin-bottom="0cm" style:contextual-spacing="false" fo:orphans="2" fo:widows="2" fo:padding="0cm" fo:border="none"/>
      <style:text-properties fo:font-variant="normal" fo:text-transform="none" style:font-name="Montserrat" fo:font-size="11.25pt" fo:letter-spacing="normal" fo:font-style="normal" fo:font-weight="normal" officeooo:paragraph-rsid="001bbb2e"/>
    </style:style>
    <style:style style:name="P45" style:family="paragraph" style:parent-style-name="Text_20_body" style:list-style-name="L3">
      <style:paragraph-properties fo:margin-top="0cm" fo:margin-bottom="0cm" style:contextual-spacing="false" fo:orphans="2" fo:widows="2" fo:padding="0cm" fo:border="none"/>
      <style:text-properties officeooo:paragraph-rsid="001bbb2e"/>
    </style:style>
    <style:style style:name="P46" style:family="paragraph" style:parent-style-name="Text_20_body" style:list-style-name="L4">
      <style:paragraph-properties fo:margin-top="0cm" fo:margin-bottom="0cm" style:contextual-spacing="false" fo:orphans="2" fo:widows="2" fo:padding="0cm" fo:border="none"/>
      <style:text-properties fo:text-transform="uppercase" fo:color="#1976d2" style:font-name="Montserrat" fo:font-size="15pt" fo:letter-spacing="normal" fo:font-style="normal" fo:font-weight="bold" officeooo:paragraph-rsid="001bbb2e"/>
    </style:style>
    <style:style style:name="P4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style:font-name="Montserrat" fo:font-size="11.25pt" fo:letter-spacing="normal" fo:font-style="normal" fo:font-weight="normal"/>
    </style:style>
    <style:style style:name="P4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976d2" style:text-line-through-style="none" style:text-line-through-type="none" fo:letter-spacing="normal" style:text-underline-style="none" style:text-blinking="false" fo:padding="0cm" fo:border="none"/>
    </style:style>
    <style:style style:name="P49"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50" style:family="paragraph" style:parent-style-name="Preformatted_20_Text" style:list-style-name="L1">
      <style:paragraph-properties fo:margin-top="0cm" fo:margin-bottom="0cm" style:contextual-spacing="false" fo:text-align="justify" style:justify-single-word="false" fo:orphans="2" fo:widows="2"/>
      <style:text-properties officeooo:paragraph-rsid="001bbb2e"/>
    </style:style>
    <style:style style:name="P51" style:family="paragraph" style:parent-style-name="Preformatted_20_Text" style:list-style-name="L2">
      <style:paragraph-properties fo:margin-top="0cm" fo:margin-bottom="0cm" style:contextual-spacing="false" fo:text-align="justify" style:justify-single-word="false" fo:orphans="2" fo:widows="2"/>
      <style:text-properties style:font-name="Times new roman" fo:font-size="12pt" officeooo:paragraph-rsid="001bbb2e" style:font-size-asian="12pt" style:font-size-complex="12pt"/>
    </style:style>
    <style:style style:name="P52" style:family="paragraph" style:parent-style-name="Preformatted_20_Text" style:list-style-name="L2">
      <style:paragraph-properties fo:margin-top="0cm" fo:margin-bottom="0cm" style:contextual-spacing="false" fo:text-align="justify" style:justify-single-word="false" fo:orphans="2" fo:widows="2"/>
      <style:text-properties fo:font-variant="normal" fo:text-transform="none" fo:color="#333333" style:font-name="Times new roman" fo:font-size="12pt" fo:letter-spacing="normal" fo:font-style="normal" fo:font-weight="normal" officeooo:paragraph-rsid="001bbb2e" style:font-size-asian="12pt" style:font-size-complex="12pt"/>
    </style:style>
    <style:style style:name="P53" style:family="paragraph" style:parent-style-name="Preformatted_20_Text" style:list-style-name="L2">
      <style:paragraph-properties fo:margin-top="0cm" fo:margin-bottom="0cm" style:contextual-spacing="false" fo:text-align="justify" style:justify-single-word="false" fo:orphans="2" fo:widows="2"/>
      <style:text-properties fo:font-variant="normal" fo:text-transform="none" fo:color="#000000" style:font-name="Times new roman" fo:font-size="12pt" fo:letter-spacing="normal" fo:font-style="normal" fo:font-weight="normal" officeooo:paragraph-rsid="001bbb2e" style:font-size-asian="12pt" style:font-size-complex="12pt"/>
    </style:style>
    <style:style style:name="P54" style:family="paragraph" style:parent-style-name="Heading_20_2" style:list-style-name="L4">
      <style:text-properties fo:text-transform="uppercase" fo:color="#1976d2" style:font-name="Montserrat" fo:font-size="16.5pt" fo:letter-spacing="normal" fo:font-style="normal" fo:font-weight="bold" officeooo:paragraph-rsid="001bbb2e"/>
    </style:style>
    <style:style style:name="P55" style:family="paragraph" style:parent-style-name="Heading_20_2">
      <style:text-properties fo:text-transform="uppercase" fo:color="#1976d2" style:font-name="Montserrat" fo:font-size="16.5pt" fo:letter-spacing="normal" fo:font-style="normal" fo:font-weight="bold" officeooo:paragraph-rsid="001bbb2e" style:font-size-asian="12pt" style:font-size-complex="12pt"/>
    </style:style>
    <style:style style:name="T1" style:family="text">
      <style:text-properties fo:font-variant="normal" fo:text-transform="none" fo:color="#333333" style:font-name="Times new roman" fo:font-size="12pt" fo:letter-spacing="normal" fo:font-style="normal" fo:font-weight="normal" style:font-size-asian="12pt" style:font-size-complex="12pt"/>
    </style:style>
    <style:style style:name="T2" style:family="text">
      <style:text-properties fo:font-variant="normal" fo:text-transform="none" fo:color="#333333" style:font-name="Times new roman" fo:font-size="12pt" fo:letter-spacing="normal" fo:font-style="normal" fo:font-weight="normal" officeooo:rsid="001bcd55" style:font-size-asian="12pt" style:font-size-complex="12pt"/>
    </style:style>
    <style:style style:name="T3" style:family="text">
      <style:text-properties fo:font-variant="normal" fo:text-transform="none" fo:color="#333333" style:font-name="Times new roman" fo:font-size="12pt" fo:letter-spacing="normal" fo:font-style="normal" fo:font-weight="bold" style:font-size-asian="12pt" style:font-size-complex="12pt" fo:padding="0cm" fo:border="none"/>
    </style:style>
    <style:style style:name="T4" style:family="text">
      <style:text-properties fo:font-variant="normal" fo:text-transform="none" fo:color="#333333" style:font-name="Times new roman"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fo:color="#333333" style:font-name="Times new roman" fo:font-size="12pt" fo:letter-spacing="normal" style:font-size-asian="12pt" style:font-size-complex="12pt"/>
    </style:style>
    <style:style style:name="T6" style:family="text">
      <style:text-properties fo:font-variant="normal" fo:text-transform="none" fo:color="#333333" style:font-name="Times new roman" fo:font-size="12pt" fo:letter-spacing="normal" style:font-size-asian="12pt" style:font-size-complex="12pt" fo:padding="0cm" fo:border="none"/>
    </style:style>
    <style:style style:name="T7" style:family="text">
      <style:text-properties fo:font-variant="normal" fo:text-transform="none" fo:color="#333333" fo:letter-spacing="normal" fo:font-style="normal" fo:font-weight="normal"/>
    </style:style>
    <style:style style:name="T8" style:family="text">
      <style:text-properties fo:font-variant="normal" fo:text-transform="none" fo:color="#333333" fo:letter-spacing="normal" fo:font-style="normal" fo:font-weight="normal" officeooo:rsid="001b1212"/>
    </style:style>
    <style:style style:name="T9" style:family="text">
      <style:text-properties fo:font-variant="normal" fo:text-transform="none" fo:color="#333333" fo:letter-spacing="normal" fo:font-style="normal" fo:font-weight="normal" officeooo:rsid="001bcd55"/>
    </style:style>
    <style:style style:name="T10" style:family="text">
      <style:text-properties fo:font-variant="normal" fo:text-transform="none" fo:color="#333333" fo:letter-spacing="normal" fo:font-style="normal" fo:font-weight="bold" officeooo:rsid="001bcd55" style:font-weight-asian="bold" style:font-weight-complex="bold"/>
    </style:style>
    <style:style style:name="T11" style:family="text">
      <style:text-properties fo:font-variant="normal" fo:text-transform="none" fo:color="#e03800" style:text-line-through-style="none" style:text-line-through-type="none" style:font-name="Times new roman" fo:font-size="12pt" fo:letter-spacing="normal" style:text-underline-style="none" style:text-blinking="false" style:font-size-asian="12pt" style:font-size-complex="12pt" fo:padding="0cm" fo:border="none"/>
    </style:style>
    <style:style style:name="T12" style:family="text">
      <style:text-properties fo:font-variant="normal" fo:text-transform="none" fo:color="#e03800" style:text-line-through-style="none" style:text-line-through-type="none" style:font-name="Times new roman" fo:font-size="12pt" fo:letter-spacing="normal" fo:font-style="normal" style:text-underline-style="none" fo:font-weight="normal" style:text-blinking="false" style:font-size-asian="12pt" style:font-size-complex="12pt" fo:padding="0cm" fo:border="none"/>
    </style:style>
    <style:style style:name="T13" style:family="text">
      <style:text-properties fo:font-variant="normal" fo:text-transform="none" fo:color="#000000" style:font-name="miltonian tattoo" fo:font-size="12pt" fo:letter-spacing="normal" fo:font-style="normal" fo:font-weight="normal"/>
    </style:style>
    <style:style style:name="T14" style:family="text">
      <style:text-properties fo:font-variant="normal" fo:text-transform="none" fo:color="#000000" style:font-name="miltonian tattoo" fo:font-size="12pt" fo:letter-spacing="normal" fo:font-style="normal" fo:font-weight="bold" fo:padding="0cm" fo:border="none"/>
    </style:style>
    <style:style style:name="T15" style:family="text">
      <style:text-properties fo:font-variant="normal" fo:text-transform="none" fo:color="#000000" style:font-name="miltonian tattoo" fo:font-size="10pt" fo:letter-spacing="normal" fo:font-style="normal" fo:font-weight="bold" style:font-size-asian="10pt" style:font-weight-asian="bold" style:font-size-complex="10pt" style:font-weight-complex="bold"/>
    </style:style>
    <style:style style:name="T16" style:family="text">
      <style:text-properties fo:font-variant="normal" fo:text-transform="none" fo:color="#000000" fo:letter-spacing="normal"/>
    </style:style>
    <style:style style:name="T17" style:family="text">
      <style:text-properties fo:font-variant="normal" fo:text-transform="none" fo:color="#0004f9" style:font-name="inherit" fo:font-size="12pt" fo:letter-spacing="normal" fo:font-style="normal" fo:font-weight="normal" fo:padding="0cm" fo:border="none"/>
    </style:style>
    <style:style style:name="T18" style:family="text">
      <style:text-properties fo:font-variant="normal" fo:text-transform="none" fo:color="#0004f9" style:font-name="inherit" fo:font-size="32pt" fo:letter-spacing="normal" fo:font-style="normal" fo:font-weight="bold" officeooo:rsid="002b83fc" style:font-size-asian="32pt" style:font-weight-asian="bold" style:font-size-complex="32pt" style:font-weight-complex="bold" fo:padding="0cm" fo:border="none"/>
    </style:style>
    <style:style style:name="T19" style:family="text">
      <style:text-properties fo:font-variant="normal" fo:text-transform="none" style:font-name="inherit" fo:font-size="11.25pt" fo:letter-spacing="normal" fo:font-style="normal" fo:font-weight="bold" fo:padding="0cm" fo:border="none"/>
    </style:style>
    <style:style style:name="T20" style:family="text">
      <style:text-properties fo:font-variant="normal" fo:text-transform="none" style:font-name="inherit" fo:font-size="11.25pt" fo:letter-spacing="normal" fo:font-style="italic" fo:font-weight="normal" fo:padding="0cm" fo:border="none"/>
    </style:style>
    <style:style style:name="T21" style:family="text">
      <style:text-properties fo:font-variant="normal" fo:text-transform="none" style:font-name="Montserrat" fo:font-size="11.25pt" fo:letter-spacing="normal" fo:font-style="normal" fo:font-weight="normal"/>
    </style:style>
    <style:style style:name="T22" style:family="text">
      <style:text-properties fo:font-variant="normal" fo:text-transform="none" fo:color="#1976d2" style:text-line-through-style="none" style:text-line-through-type="none" style:font-name="Montserrat" fo:font-size="11.25pt" fo:letter-spacing="normal" fo:font-style="normal" style:text-underline-style="none" fo:font-weight="normal" style:text-blinking="false" fo:padding="0cm" fo:border="none"/>
    </style:style>
    <style:style style:name="T23" style:family="text">
      <style:text-properties fo:color="#666666"/>
    </style:style>
    <style:style style:name="T24" style:family="text">
      <style:text-properties fo:color="#666666" officeooo:rsid="001e7085"/>
    </style:style>
    <style:style style:name="T25" style:family="text">
      <style:text-properties fo:font-size="40pt" fo:font-weight="bold" officeooo:rsid="001fd885" style:font-size-asian="40pt" style:font-weight-asian="bold" style:font-size-complex="40pt" style:font-weight-complex="bold"/>
    </style:style>
    <style:style style:name="T26" style:family="text">
      <style:text-properties style:font-name="miltonian tattoo" fo:font-size="12pt" fo:font-style="normal" fo:font-weight="normal"/>
    </style:style>
    <style:style style:name="T27" style:family="text">
      <style:text-properties fo:text-transform="uppercase" fo:color="#1976d2" style:font-name="Montserrat" fo:font-size="16.5pt" fo:letter-spacing="normal" fo:font-style="normal" fo:font-weight="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265cm" fo:margin-right="0.265cm" fo:margin-top="0.265cm" fo:margin-bottom="0.265cm" style:vertical-pos="top" style:vertical-rel="baseline" style:horizontal-pos="from-left" style:horizontal-rel="paragraph-content" fo:padding="0cm" fo:border="0.74pt solid #000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8" draw:name="Object1" text:anchor-type="page" text:anchor-page-number="1" svg:x="0cm" svg:y="0cm" svg:width="19.473cm" svg:height="4.868cm" draw:z-index="25">
        <draw:floating-frame draw:frame-name="aswift_5"/>
      </draw:frame>
      <draw:frame draw:style-name="fr8" draw:name="Object2" text:anchor-type="page" text:anchor-page-number="1" svg:x="0cm" svg:y="0cm" svg:width="19.473cm" svg:height="4.868cm" draw:z-index="26">
        <draw:floating-frame draw:frame-name="aswift_6"/>
      </draw:frame>
      <text:list xml:id="list2220428827519893886" text:style-name="L1">
        <text:list-item>
          <text:p text:style-name="P50"><text:span text:style-name="T1">The</text:span><text:span text:style-name="Strong_20_Emphasis"><text:span text:style-name="T6"> </text:span></text:span><text:span text:style-name="Strong_20_Emphasis"><text:span text:style-name="T3">UART full form</text:span></text:span><text:span text:style-name="T5"> </text:span><text:span text:style-name="T1">is “Universal Asynchronous Receiver/Transmitter”, and it is an </text:span><text:span text:style-name="T4">inbuilt IC within a microcontroller </text:span><text:span text:style-name="T1">but not like a communication protocol (I2C &amp; SPI). </text:span></text:p>
        </text:list-item>
      </text:list>
      <text:p text:style-name="P16"/>
      <text:list xml:id="list1927482092849361377" text:style-name="L2">
        <text:list-item>
          <text:p text:style-name="P51"><text:span text:style-name="T8">T</text:span><text:span text:style-name="T7">he transmitter section includes three blocks namely transmit hold register, shift register and also control logic. Likewise, the receiver section includes a receive hold register, shift register, and control logic.</text:span></text:p>
        </text:list-item>
        <text:list-item>
          <text:p text:style-name="P52">The hold register in the transmitter comprises the data-byte to be transmitted. The shift registers in transmitter and receiver move the bits to the right or left till a byte of data is transmitted or received. A read (or) write control logic is used for telling when to read or write.</text:p>
        </text:list-item>
      </text:list>
      <text:p text:style-name="P8"><draw:frame draw:style-name="fr1" draw:name="Image1" text:anchor-type="paragraph" svg:width="12.554cm" svg:height="7.278cm" draw:z-index="12"><draw:image xlink:href="Pictures/100000000000028A000001F72059F801.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75908816023100" text:continue-numbering="true" text:style-name="L2">
        <text:list-item>
          <text:p text:style-name="P53">One chip’s Tx (transmit) pin connects directly to the other’s Rx (receive) pin and vice versa. Commonly, the transmission will take place at 3.3 or 5V. UART is a single-master, single-slave protocol, where one device is set up to communicate with only one partner.</text:p>
          <text:p text:style-name="P53"/>
        </text:list-item>
        <text:list-item>
          <text:p text:style-name="P34">The data transmission of a UART can be done by using a data bus in the form of parallel by other devices like a microcontroller, memory, CPU, etc. After receiving the parallel data from the bus, it forms a data packet by adding three bits like start, stop and parity. It reads the data packet bit by bit and converts the received data into the parallel form to eliminate the three bits of the data packet. In conclusion, the data packet received by the UART transfers in parallel toward the data bus at the receiving end.</text:p>
        </text:list-item>
        <text:list-item>
          <text:p text:style-name="P20"><draw:frame draw:style-name="fr1" draw:name="Image2" text:anchor-type="paragraph" svg:width="16.14cm" svg:height="3.829cm" draw:z-index="13"><draw:image xlink:href="Pictures/1000000000000262000000CF470ACC5E.png" xlink:type="simple" xlink:show="embed" xlink:actuate="onLoad"/></draw:frame><text:span text:style-name="Strong_20_Emphasis"><text:span text:style-name="T3">Start Bit :</text:span></text:span><text:span text:style-name="T2">I</text:span><text:span text:style-name="T1">n order to begin the data transmission, the UART transmission drags the data-line from a high voltage level (1) to a low voltage level (0). </text:span></text:p>
        </text:list-item>
        <text:list-item>
          <text:p text:style-name="P20"><text:span text:style-name="T5"> </text:span><text:span text:style-name="Strong_20_Emphasis"><text:span text:style-name="T3">Stop Bit :</text:span></text:span><text:span text:style-name="T1">In order to stop the broadcast, the</text:span><text:a xlink:type="simple" xlink:href="https://en.wikipedia.org/wiki/Universal_asynchronous_receiver-transmitter" office:target-frame-name="_blank" xlink:show="new"><text:span text:style-name="T11"> </text:span></text:a><text:a xlink:type="simple" xlink:href="https://en.wikipedia.org/wiki/Universal_asynchronous_receiver-transmitter" office:target-frame-name="_blank" xlink:show="new"><text:span text:style-name="T12">UART</text:span></text:a><text:span text:style-name="T5"> </text:span><text:span text:style-name="T1">keeps the data-line on high voltage.</text:span></text:p>
        </text:list-item>
        <text:list-item>
          <text:p text:style-name="P20"><text:soft-page-break/><text:span text:style-name="Strong_20_Emphasis"><text:span text:style-name="T3">Parity Bit : </text:span></text:span><text:span text:style-name="T1">Parity bit lets the receiver to ensure whether the collected data is right or not.Actually, this bit is not widely used so it is not compulsory.</text:span></text:p>
        </text:list-item>
        <text:list-item>
          <text:p text:style-name="P20"><text:span text:style-name="Strong_20_Emphasis"><text:span text:style-name="T3">Data Bits or Data Frame :</text:span></text:span><text:span text:style-name="T1">The data frame length could be between 5 &amp; 8. If the parity bit is not used when the data frame length could be 9-bit long. Generally, the</text:span><text:span text:style-name="T4"> LSB of </text:span><text:span text:style-name="T1">the data to be transmitted first then it is very useful for transmitting.</text:span></text:p>
          <text:p text:style-name="P21"><text:span text:style-name="T7"><text:line-break/></text:span><text:span text:style-name="T10">APPLICATIONS</text:span><text:span text:style-name="T9">:</text:span></text:p>
        </text:list-item>
        <text:list-item>
          <text:p text:style-name="P20"><text:span text:style-name="T2">T</text:span><text:span text:style-name="T1">hese are also available in various communication devices like </text:span><text:a xlink:type="simple" xlink:href="https://www.elprocus.com/?s=wireless+communication" office:target-frame-name="_blank" xlink:show="new"><text:span text:style-name="T12">wireless communication</text:span></text:a><text:span text:style-name="T1">,  GPS units, </text:span><text:a xlink:type="simple" xlink:href="https://www.elprocus.com/how-does-bluetooth-work/" office:target-frame-name="_blank" xlink:show="new"><text:span text:style-name="T12">Bluetooth module</text:span></text:a><text:span text:style-name="T1">, and many other applications.</text:span></text:p>
        </text:list-item>
        <text:list-item>
          <text:p text:style-name="P22">It can be interfaced with a PC (personal computer) using a RS232-TTL converter or USB-TTL converter.</text:p>
        </text:list-item>
        <text:list-item>
          <text:p text:style-name="P22">example, we have 4-bit data, to convert it into the serial form, we need a parallel to serial converter. Generally, D flip-flops or latches are used to design the converters.</text:p>
        </text:list-item>
        <text:list-item>
          <text:p text:style-name="P22">Suitable for low speed communications</text:p>
        </text:list-item>
        <text:list-item>
          <text:p text:style-name="P23">Communication can be “full duplex” (both send and receive at the same time) or “half duplex” (devices take turns transmitting and receiving).</text:p>
        </text:list-item>
      </text:list>
      <text:p text:style-name="P2"><draw:frame draw:style-name="fr1" draw:name="Image3" text:anchor-type="paragraph" svg:width="13.757cm" svg:height="4.796cm" draw:z-index="14"><draw:image xlink:href="Pictures/1000000000000300000000F3A200332B.png" xlink:type="simple" xlink:show="embed" xlink:actuate="onLoad"/></draw:frame></text:p>
      <text:p text:style-name="P2"><text:span text:style-name="T23"><text:s text:c="4"/></text:span><text:span text:style-name="T24">Check uart is invented by ...........................</text:span></text:p>
      <text:h text:style-name="P55" text:outline-level="2">STEPS OF UART TRANSMISSION</text:h>
      <text:p text:style-name="P47">1. The transmitting UART receives data in parallel from the data bus:</text:p>
      <text:p text:style-name="P48"><draw:a xlink:type="simple" xlink:href="http://www.circuitbasics.com/wp-content/uploads/2016/01/Introduction-to-UART-Data-Transmission-Diagram-UART-Gets-Byte-from-Data-Bus.png" office:target-frame-name="_blank" xlink:show="new"><draw:frame draw:style-name="fr4" draw:name="Image22" text:anchor-type="as-char" svg:width="9.712cm" svg:height="4.964cm" draw:z-index="21"><draw:image xlink:href="Pictures/100000000000012C00000123E7B0AD6E.png" xlink:type="simple" xlink:show="embed" xlink:actuate="onLoad"/><svg:title>Introduction to UART - Data Transmission Diagram UART Gets Byte from Data Bus</svg:title></draw:frame></draw:a></text:p>
      <text:p text:style-name="P47"><text:bookmark text:name="aswift_5_expand"/><text:bookmark text:name="aswift_5_anchor"/><text:soft-page-break/>2. The transmitting UART adds the start bit, parity bit, and the stop bit(s) to the data frame:</text:p>
      <text:p text:style-name="P48"><draw:a xlink:type="simple" xlink:href="http://www.circuitbasics.com/wp-content/uploads/2016/01/Introduction-to-UART-Data-Transmission-Diagram-UART-Adds-Start-Parity-ad-Stop-Bits-2.png" office:target-frame-name="_blank" xlink:show="new"><draw:frame draw:style-name="fr3" draw:name="Image23" text:anchor-type="as-char" svg:width="7.99cm" svg:height="4.789cm" draw:z-index="22"><draw:image xlink:href="Pictures/100000000000012C000000B3BC2CD0BE.png" xlink:type="simple" xlink:show="embed" xlink:actuate="onLoad"/><svg:title>Introduction to UART - Data Transmission Diagram UART Adds Start, Parity, ad Stop Bits</svg:title></draw:frame></draw:a></text:p>
      <text:p text:style-name="P47">3. The entire packet is sent serially from the transmitting UART to the receiving UART. The receiving UART samples the data line at the pre-configured baud rate:</text:p>
      <text:p text:style-name="P48"><draw:a xlink:type="simple" xlink:href="http://www.circuitbasics.com/wp-content/uploads/2016/01/Introduction-to-UART-Data-Transmission-Diagram-Transmitting-UART-Sends-Data-Packet-Serially-to-Receiving-UART.png" office:target-frame-name="_blank" xlink:show="new"><draw:frame draw:style-name="fr3" draw:name="Image24" text:anchor-type="as-char" svg:width="11.959cm" svg:height="5.583cm" draw:z-index="23"><draw:image xlink:href="Pictures/100000000000012C0000008BD07C9839.png" xlink:type="simple" xlink:show="embed" xlink:actuate="onLoad"/><svg:title>Introduction to UART - Data Transmission Diagram Transmitting UART Sends Data Packet Serially to Receiving UART</svg:title></draw:frame></draw:a></text:p>
      <text:p text:style-name="P47"><text:bookmark text:name="aswift_6_expand"/><text:bookmark text:name="aswift_6_anchor"/>4.  The receiving UART discards the start bit, parity bit, and stop bit from the data frame:</text:p>
      <text:p text:style-name="P48"><draw:a xlink:type="simple" xlink:href="http://www.circuitbasics.com/wp-content/uploads/2016/01/Introduction-to-UART-Data-Transmission-Diagram-UART-Removes-Start-Parity-and-Stop-Bits-2.png" office:target-frame-name="_blank" xlink:show="new"><draw:frame draw:style-name="fr3" draw:name="Image25" text:anchor-type="as-char" svg:width="7.99cm" svg:height="4.789cm" draw:z-index="24"><draw:image xlink:href="Pictures/100000000000012C000000B3A27C61CF.png" xlink:type="simple" xlink:show="embed" xlink:actuate="onLoad"/><svg:title>Introduction to UART - Data Transmission Diagram UART Removes Start, Parity, and Stop Bits</svg:title></draw:frame></draw:a></text:p>
      <text:p text:style-name="P49"><text:span text:style-name="T21">5. The receiving UART converts the serial data back into parallel and transfers it to the data bus on the receiving end</text:span></text:p>
      <text:p text:style-name="P1"><text:span text:style-name="T25"><text:tab/><text:tab/><text:tab/><text:tab/><text:tab/>I2C</text:span></text:p>
      <text:p text:style-name="P3">It was invented by Philips and now it is used by almost all major IC manufacturers. </text:p>
      <text:h text:style-name="P17" text:outline-level="1"><text:bookmark text:name="IC_Address"/>I²C Address</text:h>
      <text:list xml:id="list4047555019139748952" text:style-name="L3">
        <text:list-item>
          <text:p text:style-name="P31"><text:span text:style-name="T13">7-bit address represents bits 7 to 1 while bit 0 is used to signal reading </text:span><text:soft-page-break/><text:span text:style-name="T13">from or writing to the device. I</text:span><text:span text:style-name="T15">f bit 0 (in the address byte) is set to 1 then the master device will read from the slave I2C device.</text:span></text:p>
        </text:list-item>
        <text:list-item>
          <text:p text:style-name="P31"><text:span text:style-name="T13">Master device needs no address since it generates the clock (via SCL) and addresses individual I2C slave devices.</text:span></text:p>
        </text:list-item>
        <text:list-item>
          <text:p text:style-name="P25"><text:bookmark text:name="Serial_Data_Transfer"/>Serial Data Transfer</text:p>
        </text:list-item>
        <text:list-item>
          <text:p text:style-name="P35">For each clock pulse one bit of data is transferred. The SDA signal can only change when the SCL signal is low – when the clock is high the data should be stable.</text:p>
          <text:p text:style-name="P40"><text:bookmark text:name="Start_and_Stop_Condition"/>Start and Stop Condition</text:p>
        </text:list-item>
        <text:list-item>
          <text:p text:style-name="P45"><text:span text:style-name="T13">A high to low transition of SDA is considered as </text:span><text:span text:style-name="Strong_20_Emphasis"><text:span text:style-name="T14">START</text:span></text:span><text:span text:style-name="T16"> </text:span><text:span text:style-name="T13">and a low to high transition as </text:span><text:span text:style-name="Strong_20_Emphasis"><text:span text:style-name="T14">STOP</text:span></text:span><text:span text:style-name="T13">.</text:span></text:p>
        </text:list-item>
        <text:list-item>
          <text:p text:style-name="P41"> <text:span text:style-name="T26">For both conditions SCL has to be high.</text:span></text:p>
        </text:list-item>
      </text:list>
      <text:p text:style-name="P9"><draw:frame draw:style-name="fr1" draw:name="Image4" text:anchor-type="paragraph" svg:width="13.889cm" svg:height="7.304cm" draw:z-index="15"><draw:image xlink:href="Pictures/10000201000003000000019962A4EC8A.png" xlink:type="simple" xlink:show="embed" xlink:actuate="onLoad"/></draw:frame><draw:frame draw:style-name="fr2" draw:name="Image5" text:anchor-type="paragraph" svg:x="0.628cm" svg:y="7.733cm" svg:width="15.843cm" svg:height="3.574cm" draw:z-index="16"><draw:image xlink:href="Pictures/100002010000040000000102EEB1C3C8.png" xlink:type="simple" xlink:show="embed" xlink:actuate="onLoad"/></draw:frame><text:a xlink:type="simple" xlink:href="https://i0.wp.com/www.embetronicx.com/wp-content/uploads/2017/07/bit-trans.gif"><text:span text:style-name="T17"><text:line-break/></text:span></text:a><text:span text:style-name="Strong_20_Emphasis"><text:span text:style-name="T19">Start Condition:</text:span></text:span><text:span text:style-name="T21">The SDA line switches from a high voltage level to a low voltage level </text:span><text:span text:style-name="Emphasis"><text:span text:style-name="T20">before </text:span></text:span><text:span text:style-name="T21">the SCL line switches from high to low.</text:span></text:p>
      <text:p text:style-name="P9"><text:span text:style-name="Strong_20_Emphasis"><text:span text:style-name="T19">Stop Condition:</text:span></text:span><text:span text:style-name="T21">The SDA line switches from a low voltage level to a high voltage level </text:span><text:span text:style-name="Emphasis"><text:span text:style-name="T20">after </text:span></text:span><text:span text:style-name="T21">the SCL line switches from low to high.</text:span></text:p>
      <text:p text:style-name="P9"><text:span text:style-name="Strong_20_Emphasis"><text:span text:style-name="T19">Address Frame:</text:span></text:span><text:span text:style-name="T21">A 7 or 10 bit sequence unique to each slave that identifies the slave when the master wants to talk to it.</text:span></text:p>
      <text:p text:style-name="P7"><text:line-break/><text:span text:style-name="Strong_20_Emphasis"><text:span text:style-name="T19">Read/Write Bit: </text:span></text:span><text:span text:style-name="T21">A single bit specifying whether the master is sending data to the slave (low voltage level) or requesting data from it (high voltage level).</text:span></text:p>
      <text:p text:style-name="P9"><text:soft-page-break/><text:span text:style-name="Strong_20_Emphasis"><text:span text:style-name="T19">ACK/NACK Bit:</text:span></text:span><text:span text:style-name="T21"> Each frame in a message is followed by an acknowledge/no-acknowledge bit. If an address frame or data frame was successfully received, an ACK bit is returned to the sender from the receiving device.</text:span></text:p>
      <text:p text:style-name="P7"/>
      <text:h text:style-name="P19" text:outline-level="3">ADDRESSING</text:h>
      <text:list xml:id="list2195562022651720054" text:style-name="L4">
        <text:list-item>
          <text:p text:style-name="P26">The master sends the address of the slave it wants to communicate with to every slave connected to it. Each slave then compares the address sent from the master to its own address. If the address matches, it sends a low voltage ACK bit back to the master. If the address doesn’t match, the slave does nothing and the SDA line remains high.</text:p>
          <text:p text:style-name="P32">READ/WRITE BIT</text:p>
        </text:list-item>
        <text:list-item>
          <text:p text:style-name="P42">The address frame includes a single bit at the end that informs the slave whether the master wants to write data to it or receive data from it. If the master wants to send data to the slave, the read/write bit is a low voltage level. If the master is requesting data from the slave, the bit is a high voltage level.</text:p>
        </text:list-item>
        <text:list-item>
          <text:p text:style-name="P46">THE DATA FRAME</text:p>
        </text:list-item>
        <text:list-item>
          <text:p text:style-name="P42">After the master detects the ACK bit from the slave, the first data frame is ready to be sent.</text:p>
        </text:list-item>
        <text:list-item>
          <text:p text:style-name="P42">The data frame is always 8 bits long, and sent with the most significant bit first. Each data frame is immediately followed by an ACK/NACK bit to verify that the frame has been received successfully. The ACK bit must be received by either the master or the slave (depending on who is sending the data) before the next data frame can be sent.</text:p>
        </text:list-item>
        <text:list-item>
          <text:p text:style-name="P42">After all of the data frames have been sent, the master can send a stop condition to the slave to halt the transmission. The stop condition is a voltage transition from low to high on the SDA line after a low to high transition on the SCL line, with the SCL line remaining high.</text:p>
          <text:list>
            <text:list-header>
              <text:h text:style-name="P54" text:outline-level="2">STEPS OF I2C DATA TRANSMISSION</text:h>
            </text:list-header>
          </text:list>
        </text:list-item>
      </text:list>
      <text:p text:style-name="P9"><text:span text:style-name="T21">1. The master sends the start condition to every connected slave by switching the SDA line from a high voltage level to a low voltage level </text:span><text:span text:style-name="Emphasis"><text:span text:style-name="T20">before</text:span></text:span><text:span text:style-name="T21"> switching the SCL line from high to low:</text:span></text:p>
      <text:p text:style-name="P10"><text:soft-page-break/><draw:a xlink:type="simple" xlink:href="http://www.circuitbasics.com/wp-content/uploads/2016/01/Introduction-to-I2C-Data-Transmission-Diagram-START-CONDITION-3.png" office:target-frame-name="_blank" xlink:show="new"><draw:frame draw:style-name="fr3" draw:name="Image6" text:anchor-type="as-char" svg:width="10.636cm" svg:height="6.659cm" draw:z-index="0"><draw:image xlink:href="Pictures/100000000000012C0000010F7D6FF1FA.png" xlink:type="simple" xlink:show="embed" xlink:actuate="onLoad"/><svg:title>Introduction to I2C - Data Transmission Diagram START CONDITION</svg:title></draw:frame></draw:a></text:p>
      <text:p text:style-name="P11">2. The master sends each slave the 7 or 10 bit address of the slave it wants to communicate with, along with the read/write bit:</text:p>
      <text:p text:style-name="P10"><draw:a xlink:type="simple" xlink:href="http://www.circuitbasics.com/wp-content/uploads/2016/01/Introduction-to-I2C-Data-Transmission-Diagram-ADDRESS-FRAME-2.png" office:target-frame-name="_blank" xlink:show="new"><draw:frame draw:style-name="fr3" draw:name="Image7" text:anchor-type="as-char" svg:width="13.282cm" svg:height="8.855cm" draw:z-index="1"><draw:image xlink:href="Pictures/100000000000012C000000DAF7CA7007.png" xlink:type="simple" xlink:show="embed" xlink:actuate="onLoad"/><svg:title>Introduction to I2C - Data Transmission Diagram ADDRESS FRAME</svg:title></draw:frame></draw:a></text:p>
      <text:p text:style-name="P11">3. Each slave compares the address sent from the master to its own address. If the address matches, the slave returns an ACK bit by pulling the SDA line low for one bit. If the address from the master does not match the slave’s own address, the slave leaves the SDA line high.</text:p>
      <text:p text:style-name="P10"><text:soft-page-break/><draw:a xlink:type="simple" xlink:href="http://www.circuitbasics.com/wp-content/uploads/2016/01/Introduction-to-I2C-Data-Transmission-Diagram-ACK-Bit-Slave-to-Master-2.png" office:target-frame-name="_blank" xlink:show="new"><draw:frame draw:style-name="fr3" draw:name="Image8" text:anchor-type="as-char" svg:width="13.282cm" svg:height="9.684cm" draw:z-index="2"><draw:image xlink:href="Pictures/100000000000012C000000DA1C51C64D.png" xlink:type="simple" xlink:show="embed" xlink:actuate="onLoad"/></draw:frame></draw:a></text:p>
      <text:p text:style-name="P11">4. The master sends or receives the data frame:</text:p>
      <text:p text:style-name="P10"><draw:a xlink:type="simple" xlink:href="http://www.circuitbasics.com/wp-content/uploads/2016/01/Introduction-to-I2C-Data-Transmission-Diagram-Data-Frame.png" office:target-frame-name="_blank" xlink:show="new"><draw:frame draw:style-name="fr4" draw:name="Image9" text:anchor-type="as-char" svg:width="10.636cm" svg:height="9.763cm" draw:z-index="3"><draw:image xlink:href="Pictures/100000000000012C000001132D44B072.png" xlink:type="simple" xlink:show="embed" xlink:actuate="onLoad"/><svg:title>Introduction to I2C - Data Transmission Diagram Data Frame</svg:title></draw:frame></draw:a></text:p>
      <text:p text:style-name="P11">5. After each data frame has been transferred, the receiving device returns another ACK bit to the sender to acknowledge successful receipt of the frame:</text:p>
      <text:p text:style-name="P10"><text:soft-page-break/><draw:a xlink:type="simple" xlink:href="http://www.circuitbasics.com/wp-content/uploads/2016/01/Introduction-to-I2C-Data-Transmission-Diagram-ACK-bit-slave-to-master-2A.png" office:target-frame-name="_blank" xlink:show="new"><draw:frame draw:style-name="fr3" draw:name="Image10" text:anchor-type="as-char" svg:width="10.636cm" svg:height="9.816cm" draw:z-index="4"><draw:image xlink:href="Pictures/100000000000012C000001154421FCF5.png" xlink:type="simple" xlink:show="embed" xlink:actuate="onLoad"/><svg:title>Introduction to I2C - Data Transmission Diagram ACK Bit Slave to Master</svg:title></draw:frame></draw:a></text:p>
      <text:p text:style-name="P11">6. To stop the data transmission, the master sends a stop condition to the slave by switching SCL high before switching SDA high:</text:p>
      <text:p text:style-name="P10"><draw:a xlink:type="simple" xlink:href="http://www.circuitbasics.com/wp-content/uploads/2016/01/Introduction-to-I2C-Data-Transmission-Diagram-Stop-Condition.png" office:target-frame-name="_blank" xlink:show="new"><draw:frame draw:style-name="fr3" draw:name="Image11" text:anchor-type="as-char" svg:width="10.636cm" svg:height="9.763cm" draw:z-index="5"><draw:image xlink:href="Pictures/100000000000012C00000113AF6A2CD0.png" xlink:type="simple" xlink:show="embed" xlink:actuate="onLoad"/><svg:title>Introduction to I2C - Data Transmission Diagram Stop Condition</svg:title></draw:frame></draw:a></text:p>
      <text:p text:style-name="P7"><text:line-break/><text:a xlink:type="simple" xlink:href="http://www.circuitbasics.com/basics-of-the-i2c-communication-protocol">http://www.circuitbasics.com/basics-of-the-i2c-communication-protocol</text:a></text:p>
      <text:h text:style-name="P18" text:outline-level="1"><text:bookmark text:name="Clock_Synchronization_and_Handshaking"/>Clock Synchronization and Handshaking</text:h>
      <text:list xml:id="list7919168085383426790" text:style-name="L5">
        <text:list-item>
          <text:p text:style-name="P36">Slave devices that need some time to process received byte or are not ready yet to send the next byte, can pull the clock low to signal to the <text:soft-page-break/>master that it should wait. Once the clock is released the master can proceed with the next byte.</text:p>
        </text:list-item>
        <text:list-item>
          <text:p text:style-name="P36">The allocation of I2C addresses is administered by the I2C bus committee which takes care for the allocations. Two groups of 8 I2C addresses are reserved for future uses and one address is used for 10-bit I2C addressing.</text:p>
        </text:list-item>
        <text:list-item>
          <text:p text:style-name="P36"><draw:frame draw:style-name="fr1" draw:name="Image12" text:anchor-type="paragraph" svg:width="10.583cm" svg:height="6.405cm" draw:z-index="17"><draw:image xlink:href="Pictures/1000020100000190000000FAD5164F2C.png" xlink:type="simple" xlink:show="embed" xlink:actuate="onLoad"/></draw:frame></text:p>
        </text:list-item>
      </text:list>
      <text:p text:style-name="P9"><text:a xlink:type="simple" xlink:href="https://i2.wp.com/www.embetronicx.com/wp-content/uploads/2017/07/7-bit-address-format.gif"><text:span text:style-name="T17"><text:line-break/></text:span></text:a><text:lin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5752334121148345623" text:style-name="L6">
        <text:list-item>
          <text:p text:style-name="P37">Fast Mode – supports transfer rates up to 400 kbit/s</text:p>
        </text:list-item>
        <text:list-item>
          <text:p text:style-name="P37">High-speed mode (Hs-mode) – supports transfer rates up to 3.4 Mbit/s</text:p>
        </text:list-item>
        <text:list-item>
          <text:p text:style-name="P37">10-bit addressing – supports up to 1024 I2C addresses</text:p>
        </text:list-item>
      </text:list>
      <text:h text:style-name="P14" text:outline-level="1"><text:bookmark text:name="10-bit_I2C_Addressing"/>10-bit I2C Addressing</text:h>
      <text:list xml:id="list2860444410441414413" text:style-name="L7">
        <text:list-item>
          <text:p text:style-name="P38">10-bit addressing can be used together with 7-bit addressing since a special 7-bit address (1111 0XX) is used to signal 10-bit I2C address. When a master wants to address a slave device using 10-bit addressing, it generates a start condition, then it sends 5 bits signaling 10-bit addressing (1111 0), followed by the first two bits of the I2C address and then the standard read/write bit.</text:p>
        </text:list-item>
      </text:list>
      <text:p text:style-name="P12"><draw:a xlink:type="simple" xlink:href="https://i2.wp.com/www.embetronicx.com/wp-content/uploads/2017/07/10-bit-address-writing.gif"><draw:frame draw:style-name="fr5" draw:name="Image13" text:anchor-type="as-char" svg:width="13.282cm" svg:height="2.593cm" draw:z-index="6"><draw:image xlink:href="Pictures/10000200000001F400000060EB4B6112.gif" xlink:type="simple" xlink:show="embed" xlink:actuate="onLoad"/></draw:frame></draw:a></text:p>
      <text:list xml:id="list5578830554759820756" text:style-name="L8">
        <text:list-item>
          <text:p text:style-name="P39">If the master will write data to the slave device it must send the remaining 8 bits of slave address as the second byte.</text:p>
        </text:list-item>
        <text:list-item>
          <text:p text:style-name="P39">If the master will read data from the slave device it must send the complete 10-bit address (two bytes) as for writing, then a repeated start is sent followed by the first address byte with read/write bit set to high to <text:soft-page-break/>signal reading. After this procedure the data can be read from the slave device.</text:p>
        </text:list-item>
      </text:list>
      <text:p text:style-name="P13"><draw:a xlink:type="simple" xlink:href="https://i2.wp.com/www.embetronicx.com/wp-content/uploads/2017/07/10-bit-address-writing-1.gif"><draw:frame draw:style-name="fr5" draw:name="Image14" text:anchor-type="as-char" svg:width="13.282cm" svg:height="2.593cm" draw:z-index="7"><draw:image xlink:href="Pictures/10000200000001F400000060EB4B6112.gif" xlink:type="simple" xlink:show="embed" xlink:actuate="onLoad"/><svg:title>10-bit-address-writing-1 I2C Introduction - Part 2 (Advanced Topics)</svg:title></draw:frame></draw:a></text:p>
      <text:p text:style-name="P5"><text:line-break/><text:span text:style-name="T17"> <text:s text:c="5"/></text:span><text:span text:style-name="T18">SPI</text:span></text:p>
      <text:list xml:id="list7787656306693849488" text:style-name="L9">
        <text:list-item>
          <text:p text:style-name="P27">One unique benefit of SPI is the fact that data can be transferred without interruption. Any number of bits can be sent or received in a continuous stream. With I2C and UART, data is sent in packets, limited to a specific number of bits. Start and stop conditions define the beginning and end of each packet, so the data is interrupted during transmission.</text:p>
        </text:list-item>
        <text:list-item>
          <text:p text:style-name="P30">The simplest configuration of SPI is a single master, single slave system, but one master can control more than one slave</text:p>
        </text:list-item>
      </text:list>
      <text:p text:style-name="P6"/>
      <text:p text:style-name="P4"><draw:frame draw:style-name="fr6" draw:name="Image15" text:anchor-type="paragraph" svg:width="17cm" svg:height="5.378cm" draw:z-index="18"><draw:image xlink:href="Pictures/1000020100000300000000F3A38F4F5D.png" xlink:type="simple" xlink:show="embed" xlink:actuate="onLoad"/></draw:frame></text:p>
      <text:list xml:id="list175907555778744" text:continue-numbering="true" text:style-name="L9">
        <text:list-item>
          <text:p text:style-name="P27">SPI communication is always initiated by the master since the master configures and generates the clock signal.</text:p>
        </text:list-item>
      </text:list>
      <text:h text:style-name="P15" text:outline-level="3">SLAVE SELECT</text:h>
      <text:list xml:id="list2089186689277907573" text:style-name="L10">
        <text:list-item>
          <text:p text:style-name="P43">The master can choose which slave it wants to talk to by setting the slave’s CS/SS line to a low voltage level. In the idle, non-transmitting state, the slave select line is kept at a high voltage level. Multiple CS/SS pins may be available on the master, which allows for multiple slaves to be wired in parallel. If only one CS/SS pin is present, multiple slaves can be wired to the master by daisy-chaining.</text:p>
        </text:list-item>
      </text:list>
      <text:list xml:id="list4676510677795130707" text:style-name="L11">
        <text:list-item>
          <text:p text:style-name="P28"><draw:frame draw:style-name="fr2" draw:name="Image16" text:anchor-type="paragraph" svg:x="-0.609cm" svg:y="2.097cm" svg:width="17cm" svg:height="9.686cm" draw:z-index="19"><draw:image xlink:href="Pictures/1000000000000300000003134F3899E7.png" xlink:type="simple" xlink:show="embed" xlink:actuate="onLoad"/></draw:frame><text:soft-page-break/>There are two ways to connect multiple slaves to the master. If the master has multiple slave select pins, the slaves can be wired in parallel like this:</text:p>
        </text:list-item>
        <text:list-item>
          <text:p text:style-name="P28"/>
        </text:list-item>
      </text:list>
      <text:p text:style-name="P9"><text:a xlink:type="simple" xlink:href="http://www.circuitbasics.com/wp-content/uploads/2016/01/Introduction-to-SPI-Multiple-Slave-Configuration-Separate-Slave-Select.png" office:target-frame-name="_blank" xlink:show="new"><text:span text:style-name="T22"><text:line-break/></text:span></text:a><text:line-break/></text:p>
      <text:p text:style-name="P11">If only one slave select pin is available, the slaves can be daisy-chained like this:</text:p>
      <text:p text:style-name="P11"><draw:frame draw:style-name="fr7" draw:name="Image17" text:anchor-type="paragraph" svg:width="17cm" svg:height="7.34cm" draw:z-index="20"><draw:image xlink:href="Pictures/10000201000003000000030D892DD1A3.png" xlink:type="simple" xlink:show="embed" xlink:actuate="onLoad"/></draw:frame></text:p>
      <text:list xml:id="list127472726507400457" text:style-name="L12">
        <text:list-item>
          <text:p text:style-name="P44">Data sent from the master to the slave is usually sent with the most significant bit first.</text:p>
        </text:list-item>
        <text:list-item>
          <text:p text:style-name="P44">The data sent from the slave back to the master is usually sent with the least significant bit first.</text:p>
        </text:list-item>
      </text:list>
      <text:p text:style-name="P7"><text:line-break/><text:soft-page-break/><text:span text:style-name="T27">STEPS OF SPI DATA TRANSMISSION</text:span></text:p>
      <text:p text:style-name="P11">1. The master outputs the clock signal:</text:p>
      <text:p text:style-name="P10"><draw:a xlink:type="simple" xlink:href="http://www.circuitbasics.com/wp-content/uploads/2016/01/Introduction-to-SPI-Data-Transmission-Diagram-Clock-Signal.png" office:target-frame-name="_blank" xlink:show="new"><draw:frame draw:style-name="fr3" draw:name="Image18" text:anchor-type="as-char" svg:width="14.605cm" svg:height="3.81cm" draw:z-index="8"><draw:image xlink:href="Pictures/100000000000012C0000004DF644082C.png" xlink:type="simple" xlink:show="embed" xlink:actuate="onLoad"/><svg:title>Introduction to SPI - Data Transmission Diagram Clock Signal</svg:title></draw:frame></draw:a></text:p>
      <text:p text:style-name="P11">2. The master switches the SS/CS pin to a low voltage state, which activates the slave:</text:p>
      <text:p text:style-name="P10"><text:bookmark text:name="aswift_7_expand"/><text:bookmark text:name="aswift_7_anchor"/><draw:a xlink:type="simple" xlink:href="http://www.circuitbasics.com/wp-content/uploads/2016/01/Introduction-to-SPI-Data-Transmission-Diagram-Slave-Select-Activation.png" office:target-frame-name="_blank" xlink:show="new"><draw:frame draw:style-name="fr3" draw:name="Image19" text:anchor-type="as-char" svg:width="14.605cm" svg:height="3.81cm" draw:z-index="9"><draw:image xlink:href="Pictures/100000000000012C0000004D96F795FA.png" xlink:type="simple" xlink:show="embed" xlink:actuate="onLoad"/><svg:title>Introduction to SPI - Data Transmission Diagram Slave Select Activation</svg:title></draw:frame></draw:a></text:p>
      <text:p text:style-name="P11">3. The master sends the data one bit at a time to the slave along the MOSI line. The slave reads the bits as they are received:</text:p>
      <text:p text:style-name="P10"><draw:a xlink:type="simple" xlink:href="http://www.circuitbasics.com/wp-content/uploads/2016/01/Introduction-to-SPI-Data-Transmission-Diagram-Master-to-Slave-Data-Transfer.png" office:target-frame-name="_blank" xlink:show="new"><draw:frame draw:style-name="fr3" draw:name="Image20" text:anchor-type="as-char" svg:width="14.605cm" svg:height="3.81cm" draw:z-index="10"><draw:image xlink:href="Pictures/100000000000012C0000004D256E313A.png" xlink:type="simple" xlink:show="embed" xlink:actuate="onLoad"/><svg:title>Introduction to SPI - Data Transmission Diagram Master to Slave Data Transfer</svg:title></draw:frame></draw:a></text:p>
      <text:p text:style-name="P11"><text:bookmark text:name="aswift_8_expand"/><text:bookmark text:name="aswift_8_anchor"/>4. If a response is needed, the slave returns data one bit at a time to the master along the MISO line. The master reads the bits as they are received:</text:p>
      <text:p text:style-name="P10"><draw:a xlink:type="simple" xlink:href="http://www.circuitbasics.com/wp-content/uploads/2016/01/Introduction-to-SPI-Data-Transmission-Diagram-Slave-to-Master-Data-Transfer.png" office:target-frame-name="_blank" xlink:show="new"><draw:frame draw:style-name="fr3" draw:name="Image21" text:anchor-type="as-char" svg:width="14.605cm" svg:height="3.81cm" draw:z-index="11"><draw:image xlink:href="Pictures/100000000000012C0000004DB822D260.png" xlink:type="simple" xlink:show="embed" xlink:actuate="onLoad"/><svg:title>Introduction to SPI - Data Transmission Diagram Slave to Master Data Transfer</svg:title></draw:frame></draw:a></text:p>
      <text:list xml:id="list6421945967214611697" text:style-name="L13">
        <text:list-header>
          <text:p text:style-name="P33"/>
          <text:p text:style-name="P33"/>
        </text:list-header>
        <text:list-item>
          <text:p text:style-name="P29">Only allows for a single master</text:p>
        </text:list-item>
      </text:list>
      <text:p text:style-name="P7"><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ontserrat" svg:font-family="Montserrat, Helvetica, Arial, Lucida, sans-serif"/>
    <style:font-face style:name="inherit" svg:font-family="inherit"/>
    <style:font-face style:name="miltonian tattoo" svg:font-family="'miltonian tattoo', sans-serif"/>
    <style:font-face style:name="Times new roman" svg:font-family="'Times new roman'" style:font-family-generic="roman"/>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style:font-family-asian="'Droid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style:font-family-asian="'Droid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style:font-family-asian="'Droid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30T17:59:06.878751740</dc:date>
    <meta:generator>LibreOffice/4.2.8.2$Linux_X86_64 LibreOffice_project/420m0$Build-2</meta:generator>
    <meta:editing-duration>P0D</meta:editing-duration>
    <meta:editing-cycles>1</meta:editing-cycles>
    <meta:document-statistic meta:table-count="0" meta:image-count="25" meta:object-count="2" meta:page-count="12" meta:paragraph-count="103" meta:word-count="1953" meta:character-count="10737" meta:non-whitespace-character-count="8879"/>
  </office:meta>
</office:document-meta>
</file>